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29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/>- A unified framework integrating HodgeRank and performance metrics is proposed to</text:p>
      <text:p text:style-name="P1">evaluate football team rankings.</text:p>
      <text:p text:style-name="P1"/>
      <text:p text:style-name="Standard"><text:s/>- The methodology maps event-level performance data into weighted networks, capturing interactions beyond traditional match outcomes.</text:p>
      <text:p text:style-name="Standard"/>
      <text:p text:style-name="Standard"><text:s/>- Pearson and Kendall correlations reveal significant league-dependent differences in the predictive power of individual performance indicators.</text:p>
      <text:p text:style-name="Standard"/>
      <text:p text:style-name="Standard"><text:s/>- An optimized composite rating significantly improves ranking accuracy and identifies discrepancies between on-field performance and official points.</text:p>
      <text:p text:style-name="Standard"/>
      <text:p text:style-name="Standard"><text:s/>- The Hodge decomposition's gradient component provides a robust ranking, while its cyclic part offers a measure of competitive unpredictability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0:33:01.764359888</meta:creation-date>
    <dc:date>2026-03-12T10:39:39.846507224</dc:date>
    <meta:editing-duration>PT6M39S</meta:editing-duration>
    <meta:editing-cycles>1</meta:editing-cycles>
    <meta:document-statistic meta:table-count="0" meta:image-count="0" meta:object-count="0" meta:page-count="1" meta:paragraph-count="6" meta:word-count="87" meta:character-count="691" meta:non-whitespace-character-count="605"/>
    <meta:generator>LibreOffice/7.3.7.2$Linux_X86_64 LibreOffice_project/30$Build-2</meta:generator>
  </office:meta>
</office:document-meta>
</file>